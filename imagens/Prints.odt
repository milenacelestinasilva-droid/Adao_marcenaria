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F2000003F5DEF54B1533DD5FD0.png" manifest:media-type="image/png"/>
  <manifest:file-entry manifest:full-path="Pictures/100002010000029A000003EC552756A7D759224D.png" manifest:media-type="image/png"/>
  <manifest:file-entry manifest:full-path="Pictures/100002010000023C0000035507592350D5D9BB84.png" manifest:media-type="image/png"/>
  <manifest:file-entry manifest:full-path="Pictures/100002010000025A0000036952332BAF0234BEB0.png" manifest:media-type="image/png"/>
  <manifest:file-entry manifest:full-path="Pictures/10000201000002E2000003E65584F43D0F0C8988.png" manifest:media-type="image/png"/>
  <manifest:file-entry manifest:full-path="Pictures/1000020100000291000003E623A42B51A237AC9C.png" manifest:media-type="image/png"/>
  <manifest:file-entry manifest:full-path="Pictures/100002010000078000000438DB6846FF22F8C145.png" manifest:media-type="image/png"/>
  <manifest:file-entry manifest:full-path="Pictures/100002010000028F000003C1CD982CF80D3CB6EB.png" manifest:media-type="image/png"/>
  <manifest:file-entry manifest:full-path="Pictures/10000201000003EB000003E8BF8FA844DFE8B513.png" manifest:media-type="image/png"/>
  <manifest:file-entry manifest:full-path="Pictures/100002010000078000000438E8DD33012F037286.png" manifest:media-type="image/png"/>
  <manifest:file-entry manifest:full-path="Pictures/10000201000002340000034CB530107A82A5670E.png" manifest:media-type="image/png"/>
  <manifest:file-entry manifest:full-path="Pictures/1000020100000269000003522F996C64AF0014C0.png" manifest:media-type="image/png"/>
  <manifest:file-entry manifest:full-path="Pictures/100002010000078000000438D80BB006A6A8E11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7182" officeooo:paragraph-rsid="001771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m1" text:anchor-type="paragraph" svg:x="-0.208cm" svg:y="0cm" svg:width="5.807cm" svg:height="7.8cm" draw:z-index="0"><draw:image xlink:href="Pictures/10000201000002F2000003F5DEF54B1533DD5FD0.png" xlink:type="simple" xlink:show="embed" xlink:actuate="onLoad" loext:mime-type="image/png"/></draw:frame><draw:frame draw:style-name="fr1" draw:name="Imagem2" text:anchor-type="paragraph" svg:x="5.72cm" svg:y="-0.025cm" svg:width="5.152cm" svg:height="7.77cm" draw:z-index="1"><draw:image xlink:href="Pictures/100002010000029A000003EC552756A7D759224D.png" xlink:type="simple" xlink:show="embed" xlink:actuate="onLoad" loext:mime-type="image/png"/></draw:frame><draw:frame draw:style-name="fr1" draw:name="Imagem3" text:anchor-type="paragraph" svg:x="11.058cm" svg:y="-0.025cm" svg:width="5.719cm" svg:height="7.731cm" draw:z-index="2"><draw:image xlink:href="Pictures/10000201000002E2000003E65584F43D0F0C8988.png" xlink:type="simple" xlink:show="embed" xlink:actuate="onLoad" loext:mime-type="image/png"/></draw:frame><draw:frame draw:style-name="fr1" draw:name="Imagem4" text:anchor-type="paragraph" svg:x="-0.261cm" svg:y="8.599cm" svg:width="5.749cm" svg:height="7.551cm" draw:z-index="3"><draw:image xlink:href="Pictures/1000020100000291000003E623A42B51A237AC9C.png" xlink:type="simple" xlink:show="embed" xlink:actuate="onLoad" loext:mime-type="image/png"/></draw:frame><draw:frame draw:style-name="fr1" draw:name="Imagem5" text:anchor-type="paragraph" svg:x="5.68cm" svg:y="8.618cm" svg:width="5.061cm" svg:height="7.535cm" draw:z-index="4"><draw:image xlink:href="Pictures/10000201000003EB000003E8BF8FA844DFE8B513.png" xlink:type="simple" xlink:show="embed" xlink:actuate="onLoad" loext:mime-type="image/png"/></draw:frame><draw:frame draw:style-name="fr1" draw:name="Imagem6" text:anchor-type="paragraph" svg:x="11.18cm" svg:y="8.599cm" svg:width="5.666cm" svg:height="7.553cm" draw:z-index="5"><draw:image xlink:href="Pictures/100002010000028F000003C1CD982CF80D3CB6EB.png" xlink:type="simple" xlink:show="embed" xlink:actuate="onLoad" loext:mime-type="image/png"/></draw:frame><draw:frame draw:style-name="fr1" draw:name="Imagem7" text:anchor-type="paragraph" svg:x="-1.125cm" svg:y="16.688cm" svg:width="4.777cm" svg:height="7.123cm" draw:z-index="6"><draw:image xlink:href="Pictures/100002010000023C0000035507592350D5D9BB84.png" xlink:type="simple" xlink:show="embed" xlink:actuate="onLoad" loext:mime-type="image/png"/></draw:frame><draw:frame draw:style-name="fr1" draw:name="Imagem8" text:anchor-type="paragraph" svg:x="3.978cm" svg:y="16.701cm" svg:width="4.586cm" svg:height="7.052cm" draw:z-index="7"><draw:image xlink:href="Pictures/100002010000025A0000036952332BAF0234BEB0.png" xlink:type="simple" xlink:show="embed" xlink:actuate="onLoad" loext:mime-type="image/png"/></draw:frame><draw:frame draw:style-name="fr1" draw:name="Imagem9" text:anchor-type="paragraph" svg:x="8.562cm" svg:y="17.027cm" svg:width="4.293cm" svg:height="6.422cm" draw:z-index="8"><draw:image xlink:href="Pictures/10000201000002340000034CB530107A82A5670E.png" xlink:type="simple" xlink:show="embed" xlink:actuate="onLoad" loext:mime-type="image/png"/></draw:frame><draw:frame draw:style-name="fr1" draw:name="Imagem10" text:anchor-type="paragraph" svg:x="12.853cm" svg:y="17.027cm" svg:width="4.755cm" svg:height="6.549cm" draw:z-index="9"><draw:image xlink:href="Pictures/1000020100000269000003522F996C64AF0014C0.png" xlink:type="simple" xlink:show="embed" xlink:actuate="onLoad" loext:mime-type="image/png"/></draw:frame>­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><draw:frame draw:style-name="fr1" draw:name="Imagem11" text:anchor-type="paragraph" svg:x="0.183cm" svg:y="0.175cm" svg:width="8.581cm" svg:height="6.262cm" draw:z-index="10"><draw:image xlink:href="Pictures/100002010000078000000438DB6846FF22F8C145.png" xlink:type="simple" xlink:show="embed" xlink:actuate="onLoad" loext:mime-type="image/png"/></draw:frame><draw:frame draw:style-name="fr1" draw:name="Imagem12" text:anchor-type="paragraph" svg:x="0.042cm" svg:y="7.011cm" svg:width="8.752cm" svg:height="6.221cm" draw:z-index="11"><draw:image xlink:href="Pictures/100002010000078000000438D80BB006A6A8E110.png" xlink:type="simple" xlink:show="embed" xlink:actuate="onLoad" loext:mime-type="image/png"/></draw:frame><draw:frame draw:style-name="fr1" draw:name="Imagem13" text:anchor-type="paragraph" svg:x="0.037cm" svg:y="14.249cm" svg:width="8.851cm" svg:height="6.189cm" draw:z-index="12"><draw:image xlink:href="Pictures/100002010000078000000438E8DD33012F037286.png" xlink:type="simple" xlink:show="embed" xlink:actuate="onLoad" loext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6-01T09:41:08.886000000</meta:creation-date>
    <dc:date>2026-06-01T09:57:27.926000000</dc:date>
    <meta:editing-duration>PT5M47S</meta:editing-duration>
    <meta:editing-cycles>1</meta:editing-cycles>
    <meta:document-statistic meta:table-count="0" meta:image-count="13" meta:object-count="0" meta:page-count="2" meta:paragraph-count="2" meta:word-count="1" meta:character-count="56" meta:non-whitespace-character-count="1"/>
    <meta:generator>Ultra_Office/6.2.3.2$Windows_x86 LibreOffice_project/</meta:generator>
  </office:meta>
</office:document-meta>
</file>